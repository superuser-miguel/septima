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text:list-style style:name="L1">
      <text:list-level-style-bullet text:level="1" text:bullet-char="•">
        <style:list-level-properties text:space-before="0.4cm" text:min-label-width="0.4cm"/>
      </text:list-level-style-bullet>
    </text:list-style>
  </office:automatic-styles>
  <office:body>
    <office:text>
      <text:p text:style-name="Title">Septima — Current-Day Roadmap</text:p>
      <text:p text:style-name="Subtitle">Private status snapshot · 11 July 2026 · progress mapped onto the original five-phase plan</text:p>
      <text:h text:style-name="Heading_20_1" text:outline-level="1">Where we are, in one line</text:h>
      <text:p text:style-name="Text_20_body">Phases 1–3 of the original plan are complete and shipping inside a Flatpak: Septima browses archives, extracts them (with cancel and password support), and creates them with deep modern-codec tuning and named presets. What remains is Phase 4 (hash suite + polish, whose top item is transparent nested tarball browsing) and Phase 5 (Flathub submission).</text:p>
      <text:h text:style-name="Heading_20_1" text:outline-level="1">Accomplished — against the five-phase plan</text:h>
      <text:h text:style-name="Heading_20_2" text:outline-level="2">Phase 1 — Parser &amp; engine — COMPLETE</text:h>
      <text:list text:style-name="L1">
        <text:list-item>
          <text:p text:style-name="Text_20_body">UI-free septima-engine crate (no GTK/GLib dependencies — enforced).</text:p>
        </text:list-item>
        <text:list-item>
          <text:p text:style-name="Text_20_body">7z l -slt listing parser → typed ArchiveListing / ArchiveEntry; unit-tested against captured real 7zz output.</text:p>
        </text:list-item>
        <text:list-item>
          <text:p text:style-name="Text_20_body">-bsp1 -bb1 progress-stream parser (decodes the carriage-return / backspace line redraws).</text:p>
        </text:list-item>
        <text:list-item>
          <text:p text:style-name="Text_20_body">Job control: list, extract, add, and tar→compress — all cancellable via a shared token.</text:p>
        </text:list-item>
        <text:list-item>
          <text:p text:style-name="Text_20_body">Error taxonomy: Spawn / PasswordRequired / Cancelled / SevenZip.</text:p>
        </text:list-item>
        <text:list-item>
          <text:p text:style-name="Text_20_body">Capability model (creatable formats × encode codecs × per-codec level ranges) plus a compression-memory estimate.</text:p>
        </text:list-item>
        <text:list-item>
          <text:p text:style-name="Text_20_body">Developer CLI tools (list / extract / compress examples).</text:p>
        </text:list-item>
      </text:list>
      <text:h text:style-name="Heading_20_2" text:outline-level="2">Phase 2 — Extract MVP — COMPLETE</text:h>
      <text:list text:style-name="L1">
        <text:list-item>
          <text:p text:style-name="Text_20_body">adw::Application + Blueprint UI; GtkColumnView archive browser (Name / Size / Packed / Method / Modified / CRC).</text:p>
        </text:list-item>
        <text:list-item>
          <text:p text:style-name="Text_20_body">Open via the FileChooser portal; also handles file arguments (command line and file-manager “Open with”).</text:p>
        </text:list-item>
        <text:list-item>
          <text:p text:style-name="Text_20_body">Extract to a portal-picked folder with live progress, cancel, and a password prompt for encrypted archives.</text:p>
        </text:list-item>
        <text:list-item>
          <text:p text:style-name="Text_20_body">Toasts for success; full-message error dialogs for failures.</text:p>
        </text:list-item>
        <text:list-item>
          <text:p text:style-name="Text_20_body">Deferred to Phase 4: drag-and-drop in, breadcrumb path bar.</text:p>
        </text:list-item>
      </text:list>
      <text:h text:style-name="Heading_20_2" text:outline-level="2">Phase 3 — Create &amp; tune — COMPLETE  (the differentiating release)</text:h>
      <text:list text:style-name="L1">
        <text:list-item>
          <text:p text:style-name="Text_20_body">Add-to-Archive dialog: format × codec × level, with the level range reacting to the codec (zstd 1–22, brotli 0–11, …).</text:p>
        </text:list-item>
        <text:list-item>
          <text:p text:style-name="Text_20_body">Dictionary size, solid mode, CPU threads, and a live memory estimate.</text:p>
        </text:list-item>
        <text:list-item>
          <text:p text:style-name="Text_20_body">“Optimize for executables” — the BCJ filter as a single switch, instead of -m0=bcj folklore.</text:p>
        </text:list-item>
        <text:list-item>
          <text:p text:style-name="Text_20_body">Advanced free-text parameter escape hatch for power users.</text:p>
        </text:list-item>
        <text:list-item>
          <text:p text:style-name="Text_20_body">Encryption: AES-256 with optional encrypted file names (7z).</text:p>
        </text:list-item>
        <text:list-item>
          <text:p text:style-name="Text_20_body">Split into volumes (.001, .002, …).</text:p>
        </text:list-item>
        <text:list-item>
          <text:p text:style-name="Text_20_body">tar → zstd / xz / gzip / bzip2 pipeline — real one-gesture .tar.zst creation.</text:p>
        </text:list-item>
        <text:list-item>
          <text:p text:style-name="Text_20_body">Named, reusable presets (GSettings) — surpasses 7-Zip ZS’s per-method persistence.</text:p>
        </text:list-item>
      </text:list>
      <text:h text:style-name="Heading_20_2" text:outline-level="2">Build, distribution &amp; project infrastructure — COMPLETE</text:h>
      <text:list text:style-name="L1">
        <text:list-item>
          <text:p text:style-name="Text_20_body">Meson build driving Cargo; Blueprint → gresource pipeline.</text:p>
        </text:list-item>
        <text:list-item>
          <text:p text:style-name="Text_20_body">Flatpak on the GNOME 50 runtime that builds fully offline (vendored crates) and bundles 7-Zip ZS at a pinned tag — portals only, no host filesystem access.</text:p>
        </text:list-item>
        <text:list-item>
          <text:p text:style-name="Text_20_body">Public GitHub repository, README, and a one-page landing site on GitHub Pages.</text:p>
        </text:list-item>
      </text:list>
      <text:h text:style-name="Heading_20_1" text:outline-level="1">Direction to the finish</text:h>
      <text:h text:style-name="Heading_20_2" text:outline-level="2">Phase 4 — Hash suite &amp; polish — NEXT (current focus)</text:h>
      <text:list text:style-name="L1">
        <text:list-item>
          <text:p text:style-name="Text_20_body">TOP PRIORITY — Transparent nested .tar.zst browsing (“open inside”): opening a .tar.zst shows the files inside, not just the outer tar. This turns the tarball feature from “as good as File Roller” into genuinely better.</text:p>
        </text:list-item>
        <text:list-item>
          <text:p text:style-name="Text_20_body">Hash calculator dialog: CRC → SHA-3 → BLAKE3 → xxHash (nothing in GNOME exposes this well today).</text:p>
        </text:list-item>
        <text:list-item>
          <text:p text:style-name="Text_20_body">Archive test / verify (7zz t).</text:p>
        </text:list-item>
        <text:list-item>
          <text:p text:style-name="Text_20_body">In-archive delete and rename.</text:p>
        </text:list-item>
        <text:list-item>
          <text:p text:style-name="Text_20_body">Sortable columns; file/folder icons in the Name column; breadcrumb path bar; drag-and-drop in.</text:p>
        </text:list-item>
        <text:list-item>
          <text:p text:style-name="Text_20_body">Keyboard shortcuts (shortcuts.blp), preferences, accessibility pass, GNOME HIG review.</text:p>
        </text:list-item>
        <text:list-item>
          <text:p text:style-name="Text_20_body">Custom visual styling from the Inkscape mockup, plus a properly designed app icon.</text:p>
        </text:list-item>
      </text:list>
      <text:h text:style-name="Heading_20_2" text:outline-level="2">Phase 5 — Flathub &amp; beyond — FINAL</text:h>
      <text:list text:style-name="L1">
        <text:list-item>
          <text:p text:style-name="Text_20_body">AppStream metainfo with real screenshots (needs the styled UI first).</text:p>
        </text:list-item>
        <text:list-item>
          <text:p text:style-name="Text_20_body">PERMISSIONS.md documenting every Flatpak finish-arg; portal-permission review.</text:p>
        </text:list-item>
        <text:list-item>
          <text:p text:style-name="Text_20_body">Manifest hardening; decide the one pragmatic filesystem carve-out (xdg-download) if adopted.</text:p>
        </text:list-item>
        <text:list-item>
          <text:p text:style-name="Text_20_body">Flathub submission.</text:p>
        </text:list-item>
        <text:list-item>
          <text:p text:style-name="Text_20_body">Post-v1 ideas: benchmark view, a Nautilus “Compress with Septima…” extension, session/window-state persistence.</text:p>
        </text:list-item>
      </text:list>
      <text:h text:style-name="Heading_20_1" text:outline-level="1">Key decisions that have held up</text:h>
      <text:list text:style-name="L1">
        <text:list-item>
          <text:p text:style-name="Text_20_body">Subprocess wrapper, never FFI — a codec crash can’t take down the UI; upstream updates are a one-binary swap.</text:p>
        </text:list-item>
        <text:list-item>
          <text:p text:style-name="Text_20_body">Engine crate stays UI-free — reusable for a future CLI or Nautilus extension.</text:p>
        </text:list-item>
        <text:list-item>
          <text:p text:style-name="Text_20_body">Portals-only sandbox — defensible for Flathub review; no broad filesystem access.</text:p>
        </text:list-item>
        <text:list-item>
          <text:p text:style-name="Text_20_body">Bundle (not fork) 7-Zip ZS — keeps the GPL-3.0 app code cleanly separate from 7-Zip’s LGPL.</text:p>
        </text:list-item>
      </text:list>
      <text:h text:style-name="Heading_20_1" text:outline-level="1">Status at a glance</text:h>
      <text:p text:style-name="Text_20_body">Phase 1 — done.   Phase 2 — done.   Phase 3 — done.   Infrastructure — done.   Phase 4 — next.   Phase 5 — pend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style style:name="Standard" style:family="paragraph"/>
    <style:style style:name="Text_20_body" style:display-name="Text body" style:family="paragraph" style:parent-style-name="Standard">
      <style:paragraph-properties fo:margin-top="0.1cm" fo:margin-bottom="0.15cm"/>
      <style:text-properties fo:font-size="11pt"/>
    </style:style>
    <style:style style:name="Title" style:family="paragraph" style:parent-style-name="Standard">
      <style:paragraph-properties fo:margin-bottom="0.1cm"/>
      <style:text-properties fo:font-size="26pt" fo:font-weight="bold"/>
    </style:style>
    <style:style style:name="Subtitle" style:family="paragraph" style:parent-style-name="Standard">
      <style:paragraph-properties fo:margin-bottom="0.4cm"/>
      <style:text-properties fo:font-size="12pt" fo:font-style="italic" fo:color="#555555"/>
    </style:style>
    <style:style style:name="Heading_20_1" style:display-name="Heading 1" style:family="paragraph" style:parent-style-name="Standard">
      <style:paragraph-properties fo:margin-top="0.5cm" fo:margin-bottom="0.2cm"/>
      <style:text-properties fo:font-size="17pt" fo:font-weight="bold" fo:color="#3b3a9e"/>
    </style:style>
    <style:style style:name="Heading_20_2" style:display-name="Heading 2" style:family="paragraph" style:parent-style-name="Standard">
      <style:paragraph-properties fo:margin-top="0.35cm" fo:margin-bottom="0.15cm"/>
      <style:text-properties fo:font-size="13pt" fo:font-weight="bold"/>
    </style:style>
  </office: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dc:title>Septima — Current-Day Roadmap</dc:title>
    <meta:generator>Septima project</meta:generator>
    <meta:creation-date>2026-07-11T00:10:51</meta:creation-date>
  </office:meta>
</office:document-meta>
</file>